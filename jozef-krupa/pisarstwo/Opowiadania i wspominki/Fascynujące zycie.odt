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Times New Roman" fo:font-size="18pt" style:font-size-asian="18pt" style:font-size-complex="18pt"/>
    </style:style>
    <style:style style:name="T4" style:parent-style-name="Domyślnaczcionkaakapitu" style:family="text">
      <style:text-properties style:font-name="Times New Roman" fo:font-size="18pt" style:font-size-asian="18pt" style:font-size-complex="18pt"/>
    </style:style>
    <style:style style:name="T5" style:parent-style-name="Domyślnaczcionkaakapitu" style:family="text">
      <style:text-properties style:font-name="Times New Roman" fo:font-size="18pt" style:font-size-asian="18pt" style:font-size-complex="18pt"/>
    </style:style>
    <style:style style:name="T6" style:parent-style-name="Domyślnaczcionkaakapitu" style:family="text">
      <style:text-properties style:font-name="Times New Roman" fo:font-size="18pt" style:font-size-asian="18pt" style:font-size-complex="18pt"/>
    </style:style>
    <style:style style:name="T7" style:parent-style-name="Domyślnaczcionkaakapitu" style:family="text">
      <style:text-properties style:font-name="Times New Roman" fo:font-size="18pt" style:font-size-asian="18pt" style:font-size-complex="18pt"/>
    </style:style>
    <style:style style:name="T8" style:parent-style-name="Domyślnaczcionkaakapitu" style:family="text">
      <style:text-properties style:font-name="Times New Roman" fo:font-size="18pt" style:font-size-asian="18pt" style:font-size-complex="18pt"/>
    </style:style>
    <style:style style:name="T9" style:parent-style-name="Domyślnaczcionkaakapitu" style:family="text">
      <style:text-properties style:font-name="Times New Roman" fo:font-size="18pt" style:font-size-asian="18pt" style:font-size-complex="18pt"/>
    </style:style>
    <style:style style:name="T10" style:parent-style-name="Domyślnaczcionkaakapitu" style:family="text">
      <style:text-properties style:font-name="Times New Roman" fo:font-size="18pt" style:font-size-asian="18pt" style:font-size-complex="18pt"/>
    </style:style>
    <style:style style:name="T11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2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3" style:parent-style-name="Domyślnaczcionkaakapitu" style:family="text">
      <style:text-properties style:font-name="Times New Roman" fo:font-size="18pt" style:font-size-asian="18pt" style:font-size-complex="18pt"/>
    </style:style>
    <style:style style:name="T14" style:parent-style-name="Domyślnaczcionkaakapitu" style:family="text">
      <style:text-properties style:font-name="Times New Roman" fo:font-size="18pt" style:font-size-asian="18pt" style:font-size-complex="18pt"/>
    </style:style>
    <style:style style:name="T15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6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7" style:parent-style-name="Domyślnaczcionkaakapitu" style:family="text">
      <style:text-properties style:font-name="Times New Roman" fo:font-size="18pt" style:font-size-asian="18pt" style:font-size-complex="18pt"/>
    </style:style>
    <style:style style:name="T1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28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9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0" style:parent-style-name="Domyślnaczcionkaakapitu" style:family="text">
      <style:text-properties style:font-name="Times New Roman" fo:font-size="18pt" style:font-size-asian="18pt" style:font-size-complex="18pt"/>
    </style:style>
    <style:style style:name="T3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3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48" style:parent-style-name="Domyślnaczcionkaakapitu" style:family="text">
      <style:text-properties style:font-name="Times New Roman" fo:font-size="18pt" style:font-size-asian="18pt" style:font-size-complex="18pt"/>
    </style:style>
    <style:style style:name="T4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51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5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58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59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6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61" style:parent-style-name="Domyślnaczcionkaakapitu" style:family="text">
      <style:text-properties style:font-name="Times New Roman" fo:font-size="18pt" style:font-size-asian="18pt" style:font-size-complex="18pt"/>
    </style:style>
    <style:style style:name="T62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3" style:parent-style-name="Standard" style:family="paragraph">
      <style:text-properties style:font-name="Times New Roman" fo:font-size="18pt" style:font-size-asian="18pt" style:font-size-complex="18pt"/>
    </style:style>
    <style:style style:name="P64" style:parent-style-name="Standard" style:family="paragraph">
      <style:text-properties style:font-name="Times New Roman" fo:font-size="18pt" style:font-size-asian="18pt" style:font-size-complex="18pt"/>
    </style:style>
    <style:style style:name="P65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66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6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6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69" style:parent-style-name="Domyślnaczcionkaakapitu" style:family="text">
      <style:text-properties style:font-name="Times New Roman" fo:font-size="18pt" style:font-size-asian="18pt" style:font-size-complex="18pt"/>
    </style:style>
    <style:style style:name="T70" style:parent-style-name="Domyślnaczcionkaakapitu" style:family="text">
      <style:text-properties style:font-name="Times New Roman" fo:font-size="18pt" style:font-size-asian="18pt" style:font-size-complex="18pt"/>
    </style:style>
    <style:style style:name="T7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7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7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7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7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76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77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7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79" style:parent-style-name="Domyślnaczcionkaakapitu" style:family="text">
      <style:text-properties style:font-name="Times New Roman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80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1" style:parent-style-name="Standard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82" style:parent-style-name="Domyślnaczcionkaakapitu" style:family="text">
      <style:text-properties style:font-name="Times New Roman" fo:font-size="18pt" style:font-size-asian="18pt" style:font-size-complex="18pt"/>
    </style:style>
    <style:style style:name="T8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8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8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86" style:parent-style-name="Domyślnaczcionkaakapitu" style:family="text">
      <style:text-properties style:font-name="Times New Roman" fo:font-size="18pt" style:font-size-asian="18pt" style:font-size-complex="18pt"/>
    </style:style>
    <style:style style:name="T87" style:parent-style-name="Domyślnaczcionkaakapitu" style:family="text">
      <style:text-properties style:font-name="Times New Roman" fo:font-size="18pt" style:font-size-asian="18pt" style:font-size-complex="18pt"/>
    </style:style>
    <style:style style:name="T88" style:parent-style-name="Domyślnaczcionkaakapitu" style:family="text">
      <style:text-properties style:font-name="Times New Roman" fo:font-size="18pt" style:font-size-asian="18pt" style:font-size-complex="18pt"/>
    </style:style>
    <style:style style:name="T89" style:parent-style-name="Domyślnaczcionkaakapitu" style:family="text">
      <style:text-properties style:font-name="Times New Roman" fo:font-size="18pt" style:font-size-asian="18pt" style:font-size-complex="18pt"/>
    </style:style>
    <style:style style:name="T90" style:parent-style-name="Domyślnaczcionkaakapitu" style:family="text">
      <style:text-properties style:font-name="Times New Roman" fo:font-size="18pt" style:font-size-asian="18pt" style:font-size-complex="18pt"/>
    </style:style>
    <style:style style:name="T91" style:parent-style-name="Domyślnaczcionkaakapitu" style:family="text">
      <style:text-properties style:font-name="Times New Roman" fo:font-size="18pt" style:font-size-asian="18pt" style:font-size-complex="18pt"/>
    </style:style>
    <style:style style:name="T92" style:parent-style-name="Domyślnaczcionkaakapitu" style:family="text">
      <style:text-properties style:font-name="Times New Roman" fo:font-size="18pt" style:font-size-asian="18pt" style:font-size-complex="18pt"/>
    </style:style>
    <style:style style:name="T93" style:parent-style-name="Domyślnaczcionkaakapitu" style:family="text">
      <style:text-properties style:font-name="Times New Roman" fo:font-size="18pt" style:font-size-asian="18pt" style:font-size-complex="18pt"/>
    </style:style>
    <style:style style:name="T94" style:parent-style-name="Domyślnaczcionkaakapitu" style:family="text">
      <style:text-properties style:font-name="Times New Roman" fo:font-size="18pt" style:font-size-asian="18pt" style:font-size-complex="18pt"/>
    </style:style>
    <style:style style:name="T95" style:parent-style-name="Domyślnaczcionkaakapitu" style:family="text">
      <style:text-properties style:font-name="Times New Roman" fo:font-size="18pt" style:font-size-asian="18pt" style:font-size-complex="18pt"/>
    </style:style>
    <style:style style:name="T96" style:parent-style-name="Domyślnaczcionkaakapitu" style:family="text">
      <style:text-properties style:font-name="Times New Roman" fo:font-size="18pt" style:font-size-asian="18pt" style:font-size-complex="18pt"/>
    </style:style>
    <style:style style:name="T97" style:parent-style-name="Domyślnaczcionkaakapitu" style:family="text">
      <style:text-properties style:font-name="Times New Roman" fo:font-size="18pt" style:font-size-asian="18pt" style:font-size-complex="18pt"/>
    </style:style>
    <style:style style:name="T98" style:parent-style-name="Domyślnaczcionkaakapitu" style:family="text">
      <style:text-properties style:font-name="Times New Roman" fo:font-size="18pt" style:font-size-asian="18pt" style:font-size-complex="18pt"/>
    </style:style>
    <style:style style:name="T9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0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2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13" style:parent-style-name="Standard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5" style:parent-style-name="Domyślnaczcionkaakapitu" style:family="text">
      <style:text-properties style:font-name="Times New Roman" fo:font-size="18pt" style:font-size-asian="18pt" style:font-size-complex="18pt"/>
    </style:style>
    <style:style style:name="T11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1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2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2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2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2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24" style:parent-style-name="Domyślnaczcionkaakapitu" style:family="text">
      <style:text-properties style:font-name="Times New Roman" fo:font-size="18pt" style:font-size-asian="18pt" style:font-size-complex="18pt"/>
    </style:style>
    <style:style style:name="T125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26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27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28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29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30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31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32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33" style:parent-style-name="Domyślnaczcionkaakapitu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T134" style:parent-style-name="Domyślnaczcionkaakapitu" style:family="text">
      <style:text-properties style:font-name="Times New Roman" fo:font-size="18pt" style:font-size-asian="18pt" style:font-size-complex="18pt"/>
    </style:style>
    <style:style style:name="T13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3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3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3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3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4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4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4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43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44" style:parent-style-name="Standard" style:family="paragraph"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T146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4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4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4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5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6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6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6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6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164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65" style:parent-style-name="Domyślnaczcionkaakapitu" style:family="text">
      <style:text-properties style:font-name="Times New Roman" fo:font-size="18pt" style:font-size-asian="18pt" style:font-size-complex="18pt"/>
    </style:style>
    <style:style style:name="T166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67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68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69" style:parent-style-name="Domyślnaczcionkaakapitu" style:family="text">
      <style:text-properties style:font-name="Times New Roman" fo:font-size="18pt" style:font-size-asian="18pt" style:font-size-complex="18pt"/>
    </style:style>
    <style:style style:name="T17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77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78" style:parent-style-name="Domyślnaczcionkaakapitu" style:family="text">
      <style:text-properties style:font-name="Times New Roman" fo:font-size="18pt" style:font-size-asian="18pt" style:font-size-complex="18pt"/>
    </style:style>
    <style:style style:name="T17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88" style:parent-style-name="Domyślnaczcionkaakapitu" style:family="text">
      <style:text-properties style:font-name="Times New Roman" fo:font-size="18pt" style:font-size-asian="18pt" style:font-size-complex="18pt"/>
    </style:style>
    <style:style style:name="T189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90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9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19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0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0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0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203" style:parent-style-name="Standard" style:family="paragraph">
      <style:text-properties style:font-name="Times New Roman" fo:font-size="18pt" style:font-size-asian="18pt" style:font-size-complex="18pt"/>
    </style:style>
    <style:style style:name="T204" style:parent-style-name="Domyślnaczcionkaakapitu" style:family="text">
      <style:text-properties style:font-name="Times New Roman" fo:font-size="18pt" style:font-size-asian="18pt" style:font-size-complex="18pt"/>
    </style:style>
    <style:style style:name="T205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6" style:parent-style-name="Standard" style:family="paragraph">
      <style:text-properties style:font-name="Times New Roman" fo:font-size="18pt" style:font-size-asian="18pt" style:font-size-complex="18pt"/>
    </style:style>
    <style:style style:name="P207" style:parent-style-name="Standard" style:family="paragraph">
      <style:text-properties style:font-name="Times New Roman" fo:font-size="18pt" style:font-size-asian="18pt" style:font-size-complex="18pt"/>
    </style:style>
    <style:style style:name="T208" style:parent-style-name="Domyślnaczcionkaakapitu" style:family="text">
      <style:text-properties style:font-name="Times New Roman" fo:font-size="18pt" style:font-size-asian="18pt" style:font-size-complex="18pt"/>
    </style:style>
    <style:style style:name="T20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3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4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5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6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7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8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1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20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21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22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23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24" style:parent-style-name="Standard" style:family="paragraph">
      <style:text-properties style:font-name="Times New Roman" fo:font-size="18pt" style:font-size-asian="18pt" style:font-size-complex="18pt"/>
    </style:style>
    <style:style style:name="P225" style:parent-style-name="Standard" style:family="paragraph">
      <style:text-properties style:font-name="Times New Roman" fo:font-size="18pt" style:font-size-asian="18pt" style:font-size-complex="18pt"/>
    </style:style>
    <style:style style:name="T226" style:parent-style-name="Domyślnaczcionkaakapitu" style:family="text">
      <style:text-properties style:font-name="Times New Roman" fo:font-size="18pt" style:font-size-asian="18pt" style:font-size-complex="18pt"/>
    </style:style>
    <style:style style:name="T227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228" style:parent-style-name="Domyślnaczcionkaakapitu" style:family="text">
      <style:text-properties style:font-name="Times New Roman" fo:font-size="18pt" style:font-size-asian="18pt" style:font-size-complex="18pt"/>
    </style:style>
    <style:style style:name="T229" style:parent-style-name="Domyślnaczcionkaakapitu" style:family="text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230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P231" style:parent-style-name="Standard" style:family="paragraph">
      <style:text-properties style:font-name="Times New Roman" fo:font-style="italic" style:font-style-asian="italic" style:font-style-complex="italic" fo:font-size="18pt" style:font-size-asian="18pt" style:font-size-complex="18pt"/>
    </style:style>
    <style:style style:name="T232" style:parent-style-name="Domyślnaczcionkaakapitu" style:family="text">
      <style:text-properties style:font-name="Times New Roman"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<text:s text:c="28"/>Fascynujące życie</text:p>
      <text:p text:style-name="P2"/>
      <text:p text:style-name="P3"/>
      <text:p text:style-name="Standard"><text:span text:style-name="T4">W cyklu „Znani i Nieznani” gościmy dziś scenografa, artystę-</text:span><text:span text:style-name="T5"><text:s/>malarza</text:span><text:span text:style-name="T6">,</text:span><text:span text:style-name="T7"><text:s/>fotografika</text:span><text:span text:style-name="T8"><text:s/>i grafika komputerowego,</text:span><text:span text:style-name="T9"><text:s/></text:span><text:span text:style-name="T10">pana<text:s/></text:span><text:span text:style-name="T11">Józefa</text:span><text:span text:style-name="T12"><text:s/>Krupę</text:span><text:span text:style-name="T13">, mieszkańca osiedla Wierzbowa.</text:span></text:p>
      <text:p text:style-name="Standard"><text:span text:style-name="T14">-<text:s/></text:span><text:span text:style-name="T15">Mieszka pan na tym osiedlu od 1961 roku czyli od czasu<text:s/></text:span><text:span text:style-name="T16">oddania go do użytku. Jak pan zdobył to mieszkanie ?</text:span></text:p>
      <text:p text:style-name="Standard"><text:span text:style-name="T17">-<text:s/></text:span><text:span text:style-name="T18">Pani używa słownictwa tamtych czasów, kiedy to wszystko się zdobywało. Doskonale pamiętam jak powstawała 65 lat temu Katowicka Spółdzielnia Mieszkaniowa. Pracowałem wtedy w TVP <text:s/>Katowice, która to inst</text:span><text:span text:style-name="T19">ytucja była jak gdyby pod skrzydłami matczynymi, administracyjnymi Polskiego Radia. Zapisałem się</text:span><text:span text:style-name="T20"><text:s/>tam</text:span><text:span text:style-name="T21"><text:s/>do spółdzielni mieszkaniowej.<text:s/></text:span><text:span text:style-name="T22">W moim przypadku to było 3 lata oczekiwania na 3 pokojowe mieszkanie <text:s/>przy ulicy Poniatowskiego. Dost</text:span><text:span text:style-name="T23">ałem jednak <text:s/>swoje wymarzone „M” wcześniej właśnie tutaj na osiedlu Wierzbowa dlatego iż zrezygnowała z niego<text:s/></text:span><text:span text:style-name="T24">kierownik produkcji Helena<text:s/></text:span><text:span text:style-name="T25">Patryn</text:span><text:span text:style-name="T26">,<text:s/></text:span><text:span text:style-name="T27"><text:s/></text:span></text:p>
      <text:p text:style-name="P28">Miałem przydział na 3 pokoje ponieważ przysługiwała mi dodatkowa powierzchnia.</text:p>
      <text:p text:style-name="Standard"><text:span text:style-name="T29"><text:s text:c="14"/>Tu mieszka się jak w Parku ….</text:span></text:p>
      <text:p text:style-name="Standard"><text:span text:style-name="T30">-<text:s/></text:span><text:span text:style-name="T31">To co się budowało w socjalizmie było <text:s/>bardzo siermiężne, toporne i bardzo różniło się od <text:s/>współczesnego <text:s/>budownictwa.</text:span></text:p>
      <text:p text:style-name="Standard"><text:span text:style-name="T32">W latach 60. to było bardzo małe osiedle liczące sobie raptem 6 <text:s/></text:span><text:span text:style-name="T33">dwu pietrowych<text:s/></text:span><text:span text:style-name="T34">budy</text:span><text:span text:style-name="T35">nków <text:s/></text:span><text:span text:style-name="T36">z cegły.</text:span></text:p>
      <text:p text:style-name="Standard"><text:span text:style-name="T37">Wspominam pierwsze lata kiedy tutaj zamieszkałem <text:s/>z rodziną – a <text:s/>byłem wtedy <text:s/>członkiem Rady Osiedla - <text:s/>jako <text:s/>takie pionierskie, bynajmniej nie z winy KSM czy inwestora.<text:s/></text:span><text:span text:style-name="T38">Przez jakiś czas osiedle nie było podłączone do sieci gazowej<text:s/></text:span><text:span text:style-name="T39">aby się</text:span><text:span text:style-name="T40"><text:s/>wykąpać trzeba było w łazience napalić w<text:s/></text:span><text:span text:style-name="T41">kolumnowym<text:s/></text:span><text:span text:style-name="T42">piecu węglowym. W kuchni był piec kombinowany :gazowo- <text:s/>węglowy ale<text:s/></text:span><text:span text:style-name="T43">,</text:span><text:span text:style-name="T44">gotowaliśmy na palenisku węglowym,</text:span><text:span text:style-name="T45"><text:s/>bo gazu<text:s/></text:span><text:soft-page-break/><text:span text:style-name="T46">nie było. Chociaż właściwie nie wiadomo dlaczego nie było także butli gazowych. Temperatura w mie</text:span><text:span text:style-name="T47">szkaniu zależała od tego jak funkcjonowała własna kotłownia, która mieściła się w ostatnim bloku. Takie to czasy były.</text:span></text:p>
      <text:p text:style-name="Standard"><text:span text:style-name="T48">-<text:s/></text:span><text:span text:style-name="T49">Mieliśmy także problemy z wodą a raczej z jej brakiem. Czasami trzeba było w nocy napuścić wody do wanny aby można było z niej następne</text:span><text:span text:style-name="T50">go dnia skorzystać.<text:s/></text:span></text:p>
      <text:p text:style-name="P51">- To wszystko przetrwaliśmy,<text:s/>także chodzenie na terenie osiedla w butach gumowych<text:s/>w głębokim błocie<text:s/><text:s/>minęło.<text:s/>. Nie było to zbytnio uciążliwe czego najlepszym dowodem jest fakt, iż nigdzie o tym nie napisałem.<text:s/>Jednak inaczej się wtedy żyło, ludzie byli bardziej z sobą zżyci i przyjaźni dla siebie nawzajem. Mieszkały tu rodziny w podobnym wieku z dziećmi dla których robiono ślizgawki, huśtawki, piaskownice. Wtedy popularne były czyny społeczne i dawały naprawdę<text:s/>duże rezultaty.</text:p>
      <text:p text:style-name="Standard"><text:span text:style-name="T52">-To wszystko już czas przeszły, dokonany a ja generalnie jestem bardzo, ale to bardzo zadowolony z tego, że mieszkam w wojewódzkim <text:s/>mieście a .. dookoła swojego<text:s/></text:span><text:span text:style-name="T53">domu<text:s/></text:span><text:span text:style-name="T54">słyszę … ptaszki, bo<text:s/></text:span><text:span text:style-name="T55">mamy dużo zieleni na samym osiedlu, a<text:s/></text:span><text:span text:style-name="T56">niedaleko znajdują się ogródki działkowe.. Tu się do</text:span><text:span text:style-name="T57">brze mieszka !</text:span></text:p>
      <text:p text:style-name="P58">- Te drzewa wokół , które kiedyś sami sadziliśmy - <text:s/>mają już sporo lat - <text:s/>zgodnie z pewną, <text:s/>mądrą zasadą są wyższe od budynku. Po prostu tak to drzewiej bywało. Drzewa dają nam dużo radości i cienia. Z bólem myślę o tym, iż<text:s/>tak jak starsi lokatorzy, odchodzą i stare drzewa. Żal,<text:s/>- dodaje pan J. Krupa – bo tutaj mieszka się jak w parku ! A chętnych na mieszkania tutaj jest sporo.</text:p>
      <text:p text:style-name="P59"/>
      <text:p text:style-name="Standard"><text:span text:style-name="T60"><text:s text:c="22"/></text:span><text:span text:style-name="T61"><text:s/></text:span><text:span text:style-name="T62">Urodził się na EMIE</text:span></text:p>
      <text:p text:style-name="P63">Wyjaśniam zatem, że chodzi o osiedle familoków skupione wokół kopalni EMA.<text:s/>Miejscowość wokół niej nosiła takie właśnie miano. W dokumentach zapisano, iż urodził się w Radlinie ale chrzczony był w Parafii w Biertułtowach, na Ziemi Rybnickiej.</text:p>
      <text:soft-page-break/>
      <text:p text:style-name="P64">Przed <text:s/>II wojną światową kopalnia EMA słynęła jeszcze z drużyny piłkarskiej grającej w I lidze</text:p>
      <text:p text:style-name="P65"><text:s/>Dziadkowie<text:s/>wyjechali do Westfalii , to była<text:s/>emigracja<text:s/>do kopalń zagłębia Ruhry<text:s/>pod koniec XIX wieku <text:s/>.Tam<text:s/>urodzili się moi rodzice i w Niemczech ukończyli szkoły.</text:p>
      <text:p text:style-name="P66">- Po wybuchu Powstań Śląskich najpierw wyjechali z Niemiec dziadkowie,by brać w nich udział, a<text:s/><text:s/>potem<text:s/>na plebiscyt<text:s/><text:s/><text:s/>reszta rodziny. Ojciec próbował<text:s/>górniczego fachu ale<text:s/>na Śląsku<text:s/>nastało bezrobocie… przeważały w nim ciągotki do muzyki .Zgłosił się<text:s/>ochotniczo<text:s/>do wojska. <text:s/>Tam w <text:s/>orkiestrze<text:s/><text:s/>pułkowej w Krakowie<text:s/>przez 3 lata zdobywał muzyczne szlify.</text:p>
      <text:p text:style-name="Standard"><text:span text:style-name="T67">-Mama była gospodynią domową , miała z nami – była nas piątka rodzeństwa -sporo pracy. Do dziś żyje jeszcze 3 moich braci. Wszyscy muzykowaliśmy, <text:s/>bo każdy z nas miał<text:s/></text:span><text:span text:style-name="T68">ku temu talent.</text:span><text:span text:style-name="T69"><text:s/></text:span><text:span text:style-name="T70">- P</text:span><text:span text:style-name="T71">rzed II wojną światową – opowiada pan <text:s/>Józef Krupa - <text:s text:c="2"/>udało mi się skończyć tylko 1 klasę Szkoły Powszechnej, ale dużo czytałem i dokształcałem się sam. Wtedy już mieszkaliśmy w Rybniku.<text:s/></text:span><text:span text:style-name="T72"><text:s/>Podczas wojny<text:s/></text:span><text:span text:style-name="T73">uczęszczałem do niemieckiej szkoły</text:span><text:span text:style-name="T74"><text:s/></text:span><text:span text:style-name="T75">.</text:span></text:p>
      <text:p text:style-name="P76"/>
      <text:p text:style-name="P77"><text:s text:c="22"/></text:p>
      <text:p text:style-name="Standard"><text:span text:style-name="T78"><text:s text:c="15"/></text:span><text:span text:style-name="T79"><text:s/></text:span><text:span text:style-name="T80">Co tu wybrać, gdy możliwości jest tak wiele</text:span></text:p>
      <text:p text:style-name="P81"/>
      <text:p text:style-name="Standard"><text:span text:style-name="T82">Zaraz po wojnie podjął naukę w<text:s/></text:span><text:span text:style-name="T83">Gimnazjum im. Powstańców Śląskich</text:span><text:span text:style-name="T84">; a klasę maturalną<text:s/></text:span><text:span text:style-name="T85">ukończył<text:s/></text:span><text:span text:style-name="T86"><text:s/></text:span><text:span text:style-name="T87">w szkole handlowej, której oficjalna nazwa brzmi</text:span><text:span text:style-name="T88">ała</text:span><text:span text:style-name="T89"><text:s/>: Państwowe Zakłady Kształcenia Handlowego w Rybniku<text:s/></text:span><text:span text:style-name="T90">gdzie otrzymał<text:s/></text:span><text:soft-page-break/><text:span text:style-name="T91">prócz świadectwa maturalnego także dyplom technika<text:s/></text:span><text:span text:style-name="T92">administracji gospodarczej.</text:span><text:span text:style-name="T93">.Dlaczego ?<text:s/></text:span><text:span text:style-name="T94">Namówił go <text:s/>do podjęcia tam nauki jeden z profesorów muzyki, który w tym Liceum prowadził dużą orkiestrę łącznie z chórem.<text:s/></text:span><text:span text:style-name="T95">No tak, ale co dalej po maturze ?Jak tu wybrać : czy przeważy miłość do muzyki, zwłaszcza do gry na ukochanej wiolonczeli czy</text:span><text:span text:style-name="T96"><text:s/>też plastyki , <text:s text:c="2"/>którą od dzieciństwa uprawiał z dużym powodzeniem. Była jeszcze trzecia propozycja ale tej jakoś w ogóle nie brał pod uwagę. Nauczycielka j. polskiego prof. Janina <text:s/>Podlodowska, znana w Rybniku z organizowania Rybnickich Dni Literatury i<text:s/></text:span><text:span text:style-name="T97">Poezji sugerowała mu studiowanie polonistyki, ale jakoś go to nie pociągało. To już znacznie bardziej dziennikarstwo by mu pasowało bo już wtedy coś tam pisał do szuflady.</text:span></text:p>
      <text:p text:style-name="Standard"><text:span text:style-name="T98">-<text:s/></text:span><text:span text:style-name="T99">W rezultacie – wspomina pan Józef Krupa – zdecydowałem się na plastykę .</text:span><text:span text:style-name="T100">Pożegnałem się z muzyką, ojca poprosiłem o sprzedanie mej wiolonczeli, za co mama miała pralkę.<text:s/></text:span><text:span text:style-name="T101">Wybrałem k</text:span><text:span text:style-name="T102">ierunek, który rokował<text:s/></text:span><text:span text:style-name="T103"><text:s/>pewną pracę</text:span><text:span text:style-name="T104">,</text:span><text:span text:style-name="T105"><text:s/>czyli architekturę wnętrz na poznańskiej uczelni</text:span><text:span text:style-name="T106"><text:s/>plastycznej<text:s/></text:span><text:span text:style-name="T107">. Po ukończeniu I roku doszedłem do wniosku, iż to jednak nie to!Przeniosłem się na Wydział<text:s/></text:span><text:span text:style-name="T108">malarstwa<text:s/></text:span><text:span text:style-name="T109">do ASP w Krakowie. W 1957 roku skończyłem tam st</text:span><text:span text:style-name="T110">udia.</text:span></text:p>
      <text:p text:style-name="Standard"><text:span text:style-name="T111">-<text:s/></text:span><text:span text:style-name="T112">No tak, ale dlaczego zaraz po studiach zdecydował się pan na pracę w nowo otwartym ośrodku Telewizji Polskiej w</text:span></text:p>
      <text:p text:style-name="P113"><text:s/>Katowicach ?</text:p>
      <text:p text:style-name="Standard"><text:span text:style-name="T114">-</text:span><text:span text:style-name="T115"><text:s/></text:span><text:span text:style-name="T116">Powiem tak : co nieco o telewizji wiedziałem</text:span><text:span text:style-name="T117"><text:s/>od dziecka.</text:span><text:span text:style-name="T118">. Jeszcze przed<text:s/></text:span><text:span text:style-name="T119">wojną<text:s/></text:span><text:span text:style-name="T120">dobry znajomy moich rodziców opo</text:span><text:span text:style-name="T121">wiadał nam, dzieciom o<text:s/></text:span><text:span text:style-name="T122">nadzwyczajnym wynalazku</text:span><text:span text:style-name="T123">. Do dziś pamiętam jego słowa:</text:span></text:p>
      <text:soft-page-break/>
      <text:p text:style-name="Standard"><text:span text:style-name="T124">„</text:span><text:span text:style-name="T125">W przyszłości<text:s/></text:span><text:span text:style-name="T126">będziemy mieć<text:s/></text:span><text:span text:style-name="T127">takie radia, które będą <text:s text:c="2"/>nie tylko dźwięk przekazywały , ale będzie<text:s/></text:span><text:span text:style-name="T128">tam<text:s/></text:span><text:span text:style-name="T129">także<text:s/></text:span><text:span text:style-name="T130">pokazany<text:s/></text:span><text:span text:style-name="T131">obraz jak w kinie</text:span><text:span text:style-name="T132">, tyle że mały</text:span><text:span text:style-name="T133">. To będzie telewizja.”</text:span></text:p>
      <text:p text:style-name="Standard"><text:span text:style-name="T134">-<text:s/></text:span><text:span text:style-name="T135">Bardzo mnie to<text:s/></text:span><text:span text:style-name="T136">zafrapowało a muszę tu jeszcze dodać, iż z kinem byłem „za pan brat” i zawsze mnie interesowało. Dlaczego ? Muszę wrócić wspomnieniami do Biertułtów, gdzie wtedy funkcjonowało kino „HELIOS”.Miałem wtedy zaledwie kilka lat a tam zobaczyłem wszystkie filmy z</text:span><text:span text:style-name="T137"><text:s/>Shirley Temple, Patem i Pata</text:span><text:span text:style-name="T138">ch</text:span><text:span text:style-name="T139">onem, Tarzanem. Jak mi się to udawało ? To zasługa mojej cioci, która pracowała na kopalni EMA jako kurier. Codziennie jeździła z walizką pełną dokumentów służbowych do Katowic. Jednak trochę miejsca <text:s/>jeszcze w tej walizce by</text:span><text:span text:style-name="T140">ło o czym doskonale wiedział kierownik kina”HELIOS”. Jakoś dogadał się z ciocią, żeby do Katowic zawoziła <text:s/>puszki z starymi <text:s/>filmami a przywoziła nowe. Dzięki temu rodzina miała wolny wstęp do kina. Bardzo cieszyło mnie to, iż moglem zobaczyć pierwszy dług</text:span><text:span text:style-name="T141">ometrażowy <text:s/>film Disneya czyli „Królewnę Śnieżkę”.</text:span></text:p>
      <text:p text:style-name="Standard"><text:span text:style-name="T142">-</text:span><text:span text:style-name="T143">Zrealizował pan wiele scenografii dla Teatru Telewizji, które z nich uważa pan za najważniejsze ?</text:span></text:p>
      <text:p text:style-name="P144"/>
      <text:p text:style-name="P145"/>
      <text:p text:style-name="Standard"><text:span text:style-name="T146">-<text:s/></text:span><text:span text:style-name="T147">Trudno byłoby mi teraz wybrać. Przecież najbardziej pamięta się te, które ostatnio się realizowało. Je</text:span><text:span text:style-name="T148">dną z ważniejszych i głośniejszych była scenografia –</text:span><text:span text:style-name="T149">do teatru TV„Stary Portfel” Stanisława Bieniasza, który reżyserował<text:s/></text:span><text:span text:style-name="T150">Kazimierz</text:span><text:span text:style-name="T151"><text:s/>Kutz</text:span><text:span text:style-name="T152">,<text:s/></text:span><text:span text:style-name="T153">także tą sztukę<text:s/></text:span><text:span text:style-name="T154">–</text:span><text:span text:style-name="T155">. Ten spektakl telewizyjny był produkowany jeszcze przed stanem wojennym w <text:s/>związku z p</text:span><text:span text:style-name="T156">owyższym był skazany na</text:span><text:span text:style-name="T157"><text:s/>skasowanie</text:span><text:span text:style-name="T158">.<text:s/></text:span><text:span text:style-name="T159">Kolegom z działu technicznego<text:s/></text:span><text:span text:style-name="T160">udało się go<text:s/></text:span><text:span text:style-name="T161">potajemnie<text:s/></text:span><text:span text:style-name="T162">uratować. Wyemitowano go w Teatrze Telewizji 20 kwietnia 1989 roku z następującą obsadą aktorską : Jerzy Siwy ( sztygar), Marta straszna (matka), Tadeusz Madeja ( Arnold), Lidia Maksymowicz (</text:span><text:span text:style-name="T163"><text:s/>Fryda),Jan Klemens ( Waldek)Marian Kierycz ( Paweł), Ewa Żylanka (Copiczka).</text:span></text:p>
      <text:soft-page-break/>
      <text:p text:style-name="P164">- W 1990 roku ta sztuka uzyskała nagrody : Komitetu Kultury Niezależnej „Solidarność” oraz Ośrodka TVP Katowice im. Jerzego Ziętka.</text:p>
      <text:p text:style-name="Standard"><text:span text:style-name="T165">-<text:s/></text:span><text:span text:style-name="T166">W TVP Katowice przestał pan pracować 13 grud</text:span><text:span text:style-name="T167">nia 1981 roku …</text:span></text:p>
      <text:p text:style-name="Standard"><text:span text:style-name="T168">-</text:span><text:span text:style-name="T169"><text:s/></text:span><text:span text:style-name="T170">Tak. Jeszcze w nocy 13 grudnia siedziałem w studio. Robiliśmy wtedy Estradę Poetycką. Przyszło wojsko i nas stamtąd wyrzuciło.</text:span><text:span text:style-name="T171">Od tego dnia nie miałem<text:s/></text:span><text:span text:style-name="T172">wstępu do TV.</text:span><text:span text:style-name="T173"><text:s/></text:span><text:span text:style-name="T174">Wróciłem do malarstwa.</text:span><text:span text:style-name="T175"><text:tab/></text:span></text:p>
      <text:p text:style-name="Standard"><text:span text:style-name="T176">-<text:s/></text:span><text:span text:style-name="T177">Od tego czasu uprawia pan malarstwo, grafikę komputerowa i …</text:span></text:p>
      <text:p text:style-name="Standard"><text:span text:style-name="T178">-<text:s/></text:span><text:span text:style-name="T179">Wtedy jeszcze o komputerach nikomu się nie śni</text:span><text:span text:style-name="T180">ło. Owszem uprawiałem malarstwo, które w tamtym czasie było taką kontynuacją quasi scenograficzną.</text:span><text:span text:style-name="T181"><text:s/>Moje obrazy z tamtego czasu</text:span><text:span text:style-name="T182"><text:s/>są jakby kontynuacją projektów scenograficznych, nie miały tytułów a tylko litery PS i kolejny rzymski numer. To PS znaczyło Powidoki Sceniczne</text:span><text:span text:style-name="T183">.</text:span><text:span text:style-name="T184"><text:s/></text:span><text:span text:style-name="T185">Ten cykl tematyczny liczył ponad 180 obrazów. Dziś zostało mi z nich tylko sześć.</text:span><text:span text:style-name="T186"><text:s/>Jakoś udawało się z tego żyć.</text:span><text:span text:style-name="T187"><text:s/></text:span></text:p>
      <text:p text:style-name="Standard"><text:span text:style-name="T188">-<text:s/></text:span><text:span text:style-name="T189">Obrazy najbliższe pana sercu ?</text:span></text:p>
      <text:p text:style-name="Standard"><text:span text:style-name="T190">-</text:span><text:span text:style-name="T191">Trudne pytanie,<text:s/></text:span><text:span text:style-name="T192">ponieważ nie mam takiego szczególnego przywiązania</text:span><text:span text:style-name="T193"><text:s/>do,</text:span><text:span text:style-name="T194"><text:s/></text:span><text:span text:style-name="T195">której kolwiek pracy</text:span><text:span text:style-name="T196"><text:s/>, abym mógł<text:s/></text:span><text:span text:style-name="T197">jakąś<text:s/></text:span><text:span text:style-name="T198">szczególnie wyróżniać</text:span><text:span text:style-name="T199"><text:s/></text:span><text:span text:style-name="T200">Przecież nie można zapytać matki kilkorga dzieci, które z nich kocha najbardziej, prawda ?</text:span><text:span text:style-name="T201">.<text:s/></text:span><text:span text:style-name="T202">A tak po prostu <text:s/>najważniejsze jest to dzieło, które się aktualnie tworzy.<text:s/></text:span></text:p>
      <text:p text:style-name="P203"/>
      <text:p text:style-name="Standard"><text:span text:style-name="T204"><text:s text:c="4"/></text:span><text:span text:style-name="T205">Romantyczny wątek czyli jak się poznali</text:span></text:p>
      <text:p text:style-name="P206"/>
      <text:soft-page-break/>
      <text:p text:style-name="P207">Państwo Irena i Józef Krupa są<text:s/>studenckim małżeństwem. Pani Irenka także studiowała na krakowskiej ASP, na tym samym roku <text:s/>co pan Józef.</text:p>
      <text:p text:style-name="Standard"><text:span text:style-name="T208">-<text:s/></text:span><text:span text:style-name="T209">Pobraliśmy się na piątym roku studiów -wspomina pan Józef. Na szóstym roku robiło się dyplom. Tylko wtedy żona akurat urodziła syna Tomka. Zatem <text:s/>zr</text:span><text:span text:style-name="T210">obienie dyplomu trzeba było na rok odłożyć. Przez 4 lata po ślubie mieszkaliśmy u rodziców w Bytomiu. Tam zbudowałem <text:s/>dużą pracownię na strychu, w dachu umieściłem okno takie o wymiarach 2x3 metry.<text:s/></text:span><text:span text:style-name="T211">Przed dyplomem ż</text:span><text:span text:style-name="T212">on</text:span><text:span text:style-name="T213">a</text:span><text:span text:style-name="T214"><text:s/>rozłożyła w pracowni wszystkie swoje <text:s/>obrazy<text:s/></text:span><text:span text:style-name="T215"><text:s/>przygotowane do zabrania na uczelnię</text:span><text:span text:style-name="T216">. Nasz synek Tomek miał wtedy roczek, ale potrafił już na czworakach, po schodach wejść do pracowni. Tam żona miała rozłożoną paletę z farbami. Wykorzystał to nasz<text:s/></text:span><text:span text:style-name="T217">synek, który zamalował wszystkie jej obrazy</text:span><text:span text:style-name="T218"><text:s/>czerwoną farbą olejną</text:span><text:span text:style-name="T219">! Następnego dnia I</text:span><text:span text:style-name="T220">renka miała pojechać z nimi <text:s/></text:span><text:span text:style-name="T221">do Krakowa .</text:span></text:p>
      <text:p text:style-name="Standard"><text:span text:style-name="T222"><text:s text:c="23"/></text:span><text:span text:style-name="T223">Rodzina to potęga !</text:span></text:p>
      <text:p text:style-name="P224">Państwo Irena<text:s/>Porębska-Krupa<text:s/><text:s/>i Józef Krupa mają 2 synów : Tomasza i Grzegorza. Obydwaj są <text:s/>informatykami, absolwentami Politechniki Gliwickiej. Wnuk Szymon, syn pana Tomka pracuje w Londynie zaś wnuczka Agata skończyła studia hotelarskie i zajmuje się organizacją imprez z akcentem na gastronomię.</text:p>
      <text:p text:style-name="P225">Pan Grzegorz ma 3 córki. Najstarsza Joanna<text:s/>studiowała w Londynie ma magisterium na<text:s/>dwu<text:s/>kierunkach,<text:s/>z kulturoznawstwa oraz fizyki nuklearnej .Obecnie zajmuje się badaniami genetyczno – medycznymi. Druga Dominika skończyła Wydział Ekonomii<text:s/>na Uniwersytecie. Zajmuje się z powodzeniem <text:s/>badaniami<text:s/>statystyczno medycznymi<text:s/>o czym świadczy m. innymi<text:s/>osobisty<text:s/>list z gratulacjami od<text:s/>ówczesnego ministra zdrowia Krzysztofa Radziwiłła. Trzecia <text:s/>córka, Dorota jest lekarzem radiologiem.</text:p>
      <text:p text:style-name="Standard"><text:span text:style-name="T226"><text:s text:c="16"/></text:span><text:span text:style-name="T227">Warto mieć marzenia</text:span></text:p>
      <text:p text:style-name="Standard"><text:span text:style-name="T228">-<text:s/></text:span><text:span text:style-name="T229">Czy ja mogę jeszcze w moim wieku mieć jakieś marzenia- zastanawia się pan Józef. Przecież urodziłem się w 1931 roku.</text:span></text:p>
      <text:soft-page-break/>
      <text:p text:style-name="P230">- Chciałbym spokojnie dożyć końca swoich dni i .. nie nudzić się przy tym, próbując w miarę sił jeszcze coś tworzyć<text:s/>. Póki co tak jest.</text:p>
      <text:p text:style-name="P231"/>
      <text:p text:style-name="Standard"><text:span text:style-name="T232"><text:s text:c="2"/>Urszula Węgrzy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ózef KRUPA</meta:initial-creator>
    <dc:creator>Józef KRUPA</dc:creator>
    <meta:creation-date>2022-03-27T19:48:00Z</meta:creation-date>
    <dc:date>2022-03-27T19:48:00Z</dc:date>
    <meta:template xlink:href="Normal" xlink:type="simple"/>
    <meta:editing-cycles>2</meta:editing-cycles>
    <meta:editing-duration>PT240S</meta:editing-duration>
    <meta:document-statistic meta:page-count="8" meta:paragraph-count="26" meta:word-count="1926" meta:character-count="13459" meta:row-count="96" meta:non-whitespace-character-count="11559"/>
  </office:meta>
</office:document-meta>
</file>